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29in"/>
    </style:style>
    <style:style style:name="co2" style:family="table-column">
      <style:table-column-properties fo:break-before="auto" style:column-width="1.9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689in"/>
    </style:style>
    <style:style style:name="co5" style:family="table-column">
      <style:table-column-properties fo:break-before="auto" style:column-width="2.1398in"/>
    </style:style>
    <style:style style:name="co6" style:family="table-column">
      <style:table-column-properties fo:break-before="auto" style:column-width="1.5126in"/>
    </style:style>
    <style:style style:name="co7" style:family="table-column">
      <style:table-column-properties fo:break-before="auto" style:column-width="1.0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70">
      <style:text-properties fo:font-weight="bold" style:font-weight-asian="bold" style:font-weight-complex="bold"/>
    </style:style>
    <style:style style:name="ce5" style:family="table-cell" style:parent-style-name="Default" style:data-style-name="N70"/>
    <style:style style:name="ce6" style:family="table-cell" style:parent-style-name="Default" style:data-style-name="N70">
      <style:table-cell-properties fo:border="none"/>
    </style:style>
    <style:style style:name="ce12" style:family="table-cell" style:parent-style-name="Default" style:data-style-name="N100">
      <style:table-cell-properties style:text-align-source="fix" style:repeat-content="false" fo:border="non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6"/>
        <table:table-column table:style-name="co3" table:default-cell-style-name="ce2"/>
        <table:table-row table:style-name="ro1">
          <table:table-cell table:style-name="Default" table:number-columns-repeated="2"/>
          <table:table-cell table:style-name="ce3" office:value-type="string" calcext:value-type="string" table:number-columns-spanned="3" table:number-rows-spanned="1">
            <text:p>Result</text:p>
          </table:table-cell>
          <table:covered-table-cell table:style-name="ce1"/>
          <table:covered-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Sample 1</text:p>
          </table:table-cell>
          <table:table-cell table:style-name="ce4" office:value-type="string" calcext:value-type="string">
            <text:p>Sample 2</text:p>
          </table:table-cell>
          <table:table-cell table:style-name="ce1" office:value-type="string" calcext:value-type="string">
            <text:p>Sample 3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ommit</text:p>
          </table:table-cell>
          <table:table-cell table:style-name="Default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IDEFrame::ScanText</text:p>
          </table:table-cell>
          <table:table-cell table:number-columns-repeated="2"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C2664: 'void wxEventFunctorMethod&lt;EventTag,IDEFrame,EventArg,EventHandler&gt;::CheckHandlerArgument(EventArg *)': cannot convert argument 1 from 'wxCommandEvent *' to 'EventArg *'</text:p>
          </table:table-cell>
          <table:table-cell table:style-name="ce5" office:value-type="date" office:date-value="2026-03-19T19:22:00" calcext:value-type="date">
            <text:p>03/19/26 07:22 PM</text:p>
          </table:table-cell>
          <table:table-cell table:style-name="Default" office:value-type="string" calcext:value-type="string">
            <text:p>06d543c</text:p>
          </table:table-cell>
          <table:table-cell table:style-name="Default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IDEFrame::ScanText</text:p>
          </table:table-cell>
          <table:table-cell table:style-name="Default" office:value-type="string" calcext:value-type="string">
            <text:p>Fail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The indent lines weren’t removed after the colon-line was deleted</text:p>
          </table:table-cell>
          <table:table-cell table:style-name="ce5" office:value-type="date" office:date-value="2026-03-19T19:30:00" calcext:value-type="date">
            <text:p>03/19/26 07:30 PM</text:p>
          </table:table-cell>
          <table:table-cell office:value-type="string" calcext:value-type="string">
            <text:p>06d543c</text:p>
          </table:table-cell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IDEFrame::ScanText</text:p>
          </table:table-cell>
          <table:table-cell table:number-columns-repeated="2"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Added line delete at the end of scan function for check, it didn’t run</text:p>
          </table:table-cell>
          <table:table-cell table:style-name="ce5" office:value-type="date" office:date-value="2026-03-19T19:38:00" calcext:value-type="date">
            <text:p>03/19/26 07:38 PM</text:p>
          </table:table-cell>
          <table:table-cell table:style-name="ce5" office:value-type="string" calcext:value-type="string">
            <text:p>06d543c</text:p>
          </table:table-cell>
          <table:table-cell table:style-name="Default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IDEFrame::ScanText</text:p>
          </table:table-cell>
          <table:table-cell table:number-columns-repeated="2"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Scan function not called</text:p>
          </table:table-cell>
          <table:table-cell table:style-name="ce5" office:value-type="date" office:date-value="2026-03-22T10:43:00" calcext:value-type="date">
            <text:p>03/22/26 10:43 AM</text:p>
          </table:table-cell>
          <table:table-cell table:style-name="ce12" office:value-type="string" calcext:value-type="string">
            <text:p>861e249</text:p>
          </table:table-cell>
          <table:table-cell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IDEFrame::ScanText</text:p>
          </table:table-cell>
          <table:table-cell table:number-columns-repeated="2"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Same as test 4</text:p>
          </table:table-cell>
          <table:table-cell table:style-name="ce5" office:value-type="date" office:date-value="2026-03-22T13:17:00" calcext:value-type="date">
            <text:p>03/22/26 01:17 PM</text:p>
          </table:table-cell>
          <table:table-cell table:style-name="ce12" office:value-type="string" calcext:value-type="string">
            <text:p>861e259</text:p>
          </table:table-cell>
          <table:table-cell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5"/>
          <table:table-cell/>
        </table:table-row>
        <table:table-row table:style-name="ro1" table:number-rows-repeated="15">
          <table:table-cell table:number-columns-repeated="9"/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1">00/00/0000</text:date>, <text:time style:data-style-name="N2" text:time-value="14:45:35.705709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9T19:19:59.694669500</meta:creation-date>
    <dc:date>2026-03-31T14:50:30.294798800</dc:date>
    <meta:editing-duration>PT38M46S</meta:editing-duration>
    <meta:editing-cycles>18</meta:editing-cycles>
    <meta:generator>LibreOffice/26.2.1.2$Windows_X86_64 LibreOffice_project/620$Build-2</meta:generator>
    <meta:document-statistic meta:table-count="1" meta:cell-count="49" meta:object-count="0"/>
  </office:meta>
</office:document-meta>
</file>