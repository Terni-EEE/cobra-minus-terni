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E000003E114EC45B4.png" manifest:media-type="image/png"/>
  <manifest:file-entry manifest:full-path="Pictures/100000010000077F000003DD013A966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.9472in"/>
    </style:style>
    <style:style style:name="co5" style:family="table-column">
      <style:table-column-properties fo:break-before="auto" style:column-width="1.5709in"/>
    </style:style>
    <style:style style:name="co6" style:family="table-column">
      <style:table-column-properties fo:break-before="auto" style:column-width="1.2283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1.09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5" style:family="table-cell" style:parent-style-name="Default" style:data-style-name="N70"/>
    <style:style style:name="ce6" style:family="table-cell" style:parent-style-name="Default" style:data-style-name="N70">
      <style:table-cell-properties fo:border="none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o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6"/>
        <table:table-column table:style-name="co9" table:default-cell-style-name="ce2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it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DEFrame::IDEFrame</text:p>
          </table:table-cell>
          <table:table-cell table:style-name="Default" office:value-type="string" calcext:value-type="string">
            <text:p>No debug check warning dialog when opening a project</text:p>
          </table:table-cell>
          <table:table-cell table:style-name="Default" office:value-type="string" calcext:value-type="string">
            <text:p>Dialog says “window managed by the sizer associated with the given window must have this window as parent, otherwise they will not be repositioned correctly”. See supporting image.</text:p>
          </table:table-cell>
          <table:table-cell table:style-name="ce5" office:value-type="date" office:date-value="2026-03-31T14:44:00" calcext:value-type="date">
            <text:p>03/31/26 02:44 PM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IDEFrame::IDEFrame</text:p>
          </table:table-cell>
          <table:table-cell table:style-name="Default" office:value-type="string" calcext:value-type="string">
            <text:p>No debug check warning dialog when opening a project</text:p>
          </table:table-cell>
          <table:table-cell table:style-name="Default" office:value-type="string" calcext:value-type="string">
            <text:p>Same as test 1. See supporting image.</text:p>
          </table:table-cell>
          <table:table-cell table:style-name="ce5" office:value-type="date" office:date-value="2026-03-31T15:13:00" calcext:value-type="date">
            <text:p>03/31/26 03:13 P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5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5" table:number-columns-repeated="2"/>
          <table:table-cell table:style-name="Default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style-name="ce5"/>
          <table:table-cell table:style-name="ce12"/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5"/>
          <table:table-cell/>
        </table:table-row>
        <table:table-row table:style-name="ro1" table:number-rows-repeated="15"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Media" table:style-name="ta1">
        <table:shapes>
          <draw:frame draw:z-index="0" draw:name="Image 1" draw:style-name="gr1" draw:text-style-name="P1" svg:width="8.0039in" svg:height="4.1437in" svg:x="0.487in" svg:y="0.1736in">
            <draw:image xlink:href="Pictures/100000010000077E000003E114EC45B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9902in" svg:height="4.1177in" svg:x="0.5035in" svg:y="4.4528in">
            <draw:image xlink:href="Pictures/100000010000077F000003DD013A966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5:15:10.79932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9:19:59.694669500</meta:creation-date>
    <dc:date>2026-03-31T15:18:35.829714500</dc:date>
    <meta:editing-duration>PT54M3S</meta:editing-duration>
    <meta:editing-cycles>25</meta:editing-cycles>
    <meta:generator>LibreOffice/26.2.1.2$Windows_X86_64 LibreOffice_project/620$Build-2</meta:generator>
    <meta:document-statistic meta:table-count="2" meta:cell-count="19" meta:object-count="2"/>
  </office:meta>
</office:document-meta>
</file>